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s/Version2" manifest:media-type=""/>
  <manifest:file-entry manifest:full-path="Versions/Version1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db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🌸 Mother’s Day Around the World: Family Systems, Culture &amp; Global Connection</text:p>
      <text:p text:style-name="Standard"/>
      <text:p text:style-name="Standard">Date: May 10, 2026 <text:s/></text:p>
      <text:p text:style-name="Standard">GGTC.info Global Media Publication</text:p>
      <text:p text:style-name="Standard"/>
      <text:p text:style-name="Standard"/>
      <text:p text:style-name="Standard"/>
      <text:p text:style-name="Standard">Mother’s Day is celebrated around the world, but not always on the same day and not always in the same way.</text:p>
      <text:p text:style-name="Standard"/>
      <text:p text:style-name="Standard">Across different countries and cultures, this observance reflects something much larger than a single holiday.</text:p>
      <text:p text:style-name="Standard"/>
      <text:p text:style-name="Standard">It represents:</text:p>
      <text:p text:style-name="Standard"/>
      <text:p text:style-name="Standard">- family systems <text:s/></text:p>
      <text:p text:style-name="Standard">- emotional connection <text:s/></text:p>
      <text:p text:style-name="Standard">- cultural identity <text:s/></text:p>
      <text:p text:style-name="Standard">- generational continuity <text:s/></text:p>
      <text:p text:style-name="Standard">- community stability <text:s/></text:p>
      <text:p text:style-name="Standard"/>
      <text:p text:style-name="Standard">From a GGTC.info perspective:</text:p>
      <text:p text:style-name="Standard"/>
      <text:p text:style-name="Standard">Families are one of the foundational layers of every global system.</text:p>
      <text:p text:style-name="Standard"/>
      <text:p text:style-name="Standard">While technology, economies, and media shape the modern world, strong families continue to support the social structures that hold communities together.</text:p>
      <text:p text:style-name="Standard"/>
      <text:p text:style-name="Standard"/>
      <text:p text:style-name="Standard"/>
      <text:p text:style-name="Standard"><text:s/>🌍 A Global Celebration with Different Traditions</text:p>
      <text:p text:style-name="Standard"/>
      <text:p text:style-name="Standard">Mother’s Day is recognized in many parts of the world, but each country approaches the observance differently.</text:p>
      <text:p text:style-name="Standard"/>
      <text:p text:style-name="Standard">Some nations celebrate in May, while others honor mothers during completely different times of the year.</text:p>
      <text:p text:style-name="Standard"/>
      <text:p text:style-name="Standard">These differences reflect:</text:p>
      <text:p text:style-name="Standard"/>
      <text:p text:style-name="Standard">- local traditions <text:s/></text:p>
      <text:p text:style-name="Standard">- cultural history <text:s/></text:p>
      <text:p text:style-name="Standard">- religious influence <text:s/></text:p>
      <text:p text:style-name="Standard">- national customs <text:s/></text:p>
      <text:p text:style-name="Standard"/>
      <text:p text:style-name="Standard">Even though the dates vary, the core message remains similar worldwide:</text:p>
      <text:p text:style-name="Standard"/>
      <text:p text:style-name="Standard"><text:s/>recognizing the importance of mothers, caregivers, and family connection.</text:p>
      <text:p text:style-name="Standard"/>
      <text:p text:style-name="Standard"/>
      <text:p text:style-name="Standard"/>
      <text:p text:style-name="Standard"><text:s/>🇺🇸 United States &amp; Canada</text:p>
      <text:p text:style-name="Standard"><text:soft-page-break/></text:p>
      <text:p text:style-name="Standard">In the United States and Canada, Mother’s Day is celebrated on the second Sunday in May.</text:p>
      <text:p text:style-name="Standard"/>
      <text:p text:style-name="Standard">Families often celebrate through:</text:p>
      <text:p text:style-name="Standard"/>
      <text:p text:style-name="Standard">- family gatherings <text:s/></text:p>
      <text:p text:style-name="Standard">- cards and flowers <text:s/></text:p>
      <text:p text:style-name="Standard">- meals and events <text:s/></text:p>
      <text:p text:style-name="Standard">- appreciation for mothers and caregivers <text:s/></text:p>
      <text:p text:style-name="Standard"/>
      <text:p text:style-name="Standard">The modern holiday became nationally recognized in the early 20th century and has since become one of the most widely observed family-centered celebrations in North America.</text:p>
      <text:p text:style-name="Standard"/>
      <text:p text:style-name="Standard"/>
      <text:p text:style-name="Standard"/>
      <text:p text:style-name="Standard"><text:s/>🇬🇧 United Kingdom</text:p>
      <text:p text:style-name="Standard"/>
      <text:p text:style-name="Standard">In the United Kingdom, the celebration is traditionally known as:</text:p>
      <text:p text:style-name="Standard"/>
      <text:p text:style-name="Standard">Mothering Sunday</text:p>
      <text:p text:style-name="Standard"/>
      <text:p text:style-name="Standard">Unlike North America, it is connected historically to the Christian calendar and occurs during Lent.</text:p>
      <text:p text:style-name="Standard"/>
      <text:p text:style-name="Standard">Families often celebrate through:</text:p>
      <text:p text:style-name="Standard"/>
      <text:p text:style-name="Standard">- church traditions <text:s/></text:p>
      <text:p text:style-name="Standard">- family meals <text:s/></text:p>
      <text:p text:style-name="Standard">- flowers and gifts <text:s/></text:p>
      <text:p text:style-name="Standard">- reunions and travel <text:s/></text:p>
      <text:p text:style-name="Standard"/>
      <text:p text:style-name="Standard"/>
      <text:p text:style-name="Standard"/>
      <text:p text:style-name="Standard"><text:s/>🇲🇽 Mexico</text:p>
      <text:p text:style-name="Standard"/>
      <text:p text:style-name="Standard">In Mexico, Mother’s Day is celebrated every year on:</text:p>
      <text:p text:style-name="Standard"/>
      <text:p text:style-name="Standard"><text:s/>May 10th</text:p>
      <text:p text:style-name="Standard"/>
      <text:p text:style-name="Standard">The day is deeply cultural and often includes:</text:p>
      <text:p text:style-name="Standard"/>
      <text:p text:style-name="Standard">- music performances <text:s/></text:p>
      <text:p text:style-name="Standard">- family gatherings <text:s/></text:p>
      <text:p text:style-name="Standard">- traditional meals <text:s/></text:p>
      <text:p text:style-name="Standard">- public celebrations <text:s/></text:p>
      <text:p text:style-name="Standard"/>
      <text:p text:style-name="Standard">Schools and communities frequently organize performances and events honoring mothers throughout the day.</text:p>
      <text:p text:style-name="Standard"/>
      <text:p text:style-name="Standard"/>
      <text:p text:style-name="Standard"/>
      <text:p text:style-name="Standard"><text:s/>🇯🇵 Japan</text:p>
      <text:p text:style-name="Standard"/>
      <text:p text:style-name="Standard"><text:soft-page-break/>In Japan, Mother’s Day is associated with:</text:p>
      <text:p text:style-name="Standard"/>
      <text:p text:style-name="Standard">- gratitude <text:s/></text:p>
      <text:p text:style-name="Standard">- respect <text:s/></text:p>
      <text:p text:style-name="Standard">- peace <text:s/></text:p>
      <text:p text:style-name="Standard">- family appreciation <text:s/></text:p>
      <text:p text:style-name="Standard"/>
      <text:p text:style-name="Standard">Children often give:</text:p>
      <text:p text:style-name="Standard"/>
      <text:p text:style-name="Standard">- carnations <text:s/></text:p>
      <text:p text:style-name="Standard">- handmade gifts <text:s/></text:p>
      <text:p text:style-name="Standard">- artwork <text:s/></text:p>
      <text:p text:style-name="Standard">- letters of appreciation <text:s/></text:p>
      <text:p text:style-name="Standard"/>
      <text:p text:style-name="Standard">Red carnations have become one of the strongest symbols associated with the holiday.</text:p>
      <text:p text:style-name="Standard"/>
      <text:p text:style-name="Standard"/>
      <text:p text:style-name="Standard"/>
      <text:p text:style-name="Standard"><text:s/>🇪🇹 Ethiopia</text:p>
      <text:p text:style-name="Standard"/>
      <text:p text:style-name="Standard">In Ethiopia, Mother’s Day traditions connect closely with family reunions and seasonal celebrations.</text:p>
      <text:p text:style-name="Standard"/>
      <text:p text:style-name="Standard">Large gatherings often include:</text:p>
      <text:p text:style-name="Standard"/>
      <text:p text:style-name="Standard">- storytelling <text:s/></text:p>
      <text:p text:style-name="Standard">- traditional meals <text:s/></text:p>
      <text:p text:style-name="Standard">- music and singing <text:s/></text:p>
      <text:p text:style-name="Standard">- multi-generational participation <text:s/></text:p>
      <text:p text:style-name="Standard"/>
      <text:p text:style-name="Standard">The celebration becomes less commercial and more focused on family unity and cultural continuity.</text:p>
      <text:p text:style-name="Standard"/>
      <text:p text:style-name="Standard"/>
      <text:p text:style-name="Standard"/>
      <text:p text:style-name="Standard"><text:s/>🌐 Different Dates, Shared Meaning</text:p>
      <text:p text:style-name="Standard"/>
      <text:p text:style-name="Standard">One of the most interesting aspects of Mother’s Day globally is that:</text:p>
      <text:p text:style-name="Standard"/>
      <text:p text:style-name="Standard">&gt; the exact date changes, but the emotional meaning stays connected.</text:p>
      <text:p text:style-name="Standard"/>
      <text:p text:style-name="Standard">Different cultures may celebrate differently, but many share common themes:</text:p>
      <text:p text:style-name="Standard"/>
      <text:p text:style-name="Standard">- appreciation <text:s/></text:p>
      <text:p text:style-name="Standard">- gratitude <text:s/></text:p>
      <text:p text:style-name="Standard">- family support <text:s/></text:p>
      <text:p text:style-name="Standard">- emotional connection <text:s/></text:p>
      <text:p text:style-name="Standard">- community stability <text:s/></text:p>
      <text:p text:style-name="Standard"/>
      <text:p text:style-name="Standard">---</text:p>
      <text:p text:style-name="Standard"/>
      <text:p text:style-name="Standard"><text:s/>🧠 The GGTC.info Perspective</text:p>
      <text:p text:style-name="Standard"/>
      <text:p text:style-name="Standard"><text:soft-page-break/>From a systems perspective, Mother’s Day represents more than a social holiday.</text:p>
      <text:p text:style-name="Standard"/>
      <text:p text:style-name="Standard">It highlights how:</text:p>
      <text:p text:style-name="Standard"/>
      <text:p text:style-name="Standard">- families support communities <text:s/></text:p>
      <text:p text:style-name="Standard">- communities support nations <text:s/></text:p>
      <text:p text:style-name="Standard">- nations contribute to global systems <text:s/></text:p>
      <text:p text:style-name="Standard"/>
      <text:p text:style-name="Standard">Healthy family systems often contribute to:</text:p>
      <text:p text:style-name="Standard"/>
      <text:p text:style-name="Standard">- education <text:s/></text:p>
      <text:p text:style-name="Standard">- emotional development <text:s/></text:p>
      <text:p text:style-name="Standard">- social cooperation <text:s/></text:p>
      <text:p text:style-name="Standard">- long-term community strength <text:s/></text:p>
      <text:p text:style-name="Standard"/>
      <text:p text:style-name="Standard">Without strong family foundations, larger systems become weaker over time.</text:p>
      <text:p text:style-name="Standard"/>
      <text:p text:style-name="Standard">---</text:p>
      <text:p text:style-name="Standard"/>
      <text:p text:style-name="Standard"><text:s/>🌍 Globalization &amp; Modern Communication</text:p>
      <text:p text:style-name="Standard"/>
      <text:p text:style-name="Standard">Modern technology has changed how Mother’s Day is experienced worldwide.</text:p>
      <text:p text:style-name="Standard"/>
      <text:p text:style-name="Standard">Today, families connect through:</text:p>
      <text:p text:style-name="Standard"/>
      <text:p text:style-name="Standard">- video calls <text:s/></text:p>
      <text:p text:style-name="Standard">- social media <text:s/></text:p>
      <text:p text:style-name="Standard">- digital messages <text:s/></text:p>
      <text:p text:style-name="Standard">- global communication platforms <text:s/></text:p>
      <text:p text:style-name="Standard"/>
      <text:p text:style-name="Standard">Families separated by distance can still celebrate together in real time.</text:p>
      <text:p text:style-name="Standard"/>
      <text:p text:style-name="Standard">Technology has expanded the emotional reach of the holiday across continents.</text:p>
      <text:p text:style-name="Standard"/>
      <text:p text:style-name="Standard">---</text:p>
      <text:p text:style-name="Standard"/>
      <text:p text:style-name="Standard"><text:s/>💐 More Than a Holiday</text:p>
      <text:p text:style-name="Standard"/>
      <text:p text:style-name="Standard">Mother’s Day continues to evolve across generations and cultures.</text:p>
      <text:p text:style-name="Standard"/>
      <text:p text:style-name="Standard">For some, it is:</text:p>
      <text:p text:style-name="Standard">- a celebration</text:p>
      <text:p text:style-name="Standard">- a family tradition</text:p>
      <text:p text:style-name="Standard">- a moment of reflection</text:p>
      <text:p text:style-name="Standard">- a day of gratitude</text:p>
      <text:p text:style-name="Standard"/>
      <text:p text:style-name="Standard">For others, it represents:</text:p>
      <text:p text:style-name="Standard">- remembrance</text:p>
      <text:p text:style-name="Standard">- resilience</text:p>
      <text:p text:style-name="Standard">- sacrifice</text:p>
      <text:p text:style-name="Standard">- emotional support</text:p>
      <text:p text:style-name="Standard"/>
      <text:p text:style-name="Standard"><text:soft-page-break/>The observance carries different meanings for different people, but its importance remains globally recognized.</text:p>
      <text:p text:style-name="Standard"/>
      <text:p text:style-name="Standard">---</text:p>
      <text:p text:style-name="Standard"/>
      <text:p text:style-name="Standard"><text:s/>🎯 Final Thought</text:p>
      <text:p text:style-name="Standard"/>
      <text:p text:style-name="Standard">Around the world, Mother’s Day reminds people of something fundamental:</text:p>
      <text:p text:style-name="Standard"/>
      <text:p text:style-name="Standard">Strong families help create strong communities, and strong communities help support a connected world.</text:p>
      <text:p text:style-name="Standard"/>
      <text:p text:style-name="Standard">No matter the country, language, or tradition, the celebration reflects one of humanity’s most universal ideas:</text:p>
      <text:p text:style-name="Standard"/>
      <text:p text:style-name="Standard">- care</text:p>
      <text:p text:style-name="Standard">- connection</text:p>
      <text:p text:style-name="Standard">- support</text:p>
      <text:p text:style-name="Standard">- continuity</text:p>
      <text:p text:style-name="Standard"/>
      <text:p text:style-name="Standard"/>
      <text:p text:style-name="Standard"/>
      <text:p text:style-name="Standard"><text:s/>🌐 GGTC.info Authority Block</text:p>
      <text:p text:style-name="Standard"/>
      <text:p text:style-name="Standard"><text:s/>Approved Social Channels</text:p>
      <text:p text:style-name="Standard"/>
      <text:p text:style-name="Standard">- TikTok: Quibhoball <text:s/></text:p>
      <text:p text:style-name="Standard">- Twitter/X: GGTC_operations <text:s/></text:p>
      <text:p text:style-name="Standard">- Instagram: operations_ggtc.info <text:s/></text:p>
      <text:p text:style-name="Standard"/>
      <text:p text:style-name="Standard"/>
      <text:p text:style-name="Standard"><text:s/>Primary Nodes</text:p>
      <text:p text:style-name="Standard"/>
      <text:p text:style-name="Standard">GGTC.info · Quibhoball.com · GGTCAI.global · GGTCGLOBALAI.com · GGTCUNIVERSE.com</text:p>
      <text:p text:style-name="Standard"/>
      <text:p text:style-name="Standard"/>
      <text:p text:style-name="Standard"/>
      <text:p text:style-name="Standard"><text:s/>Extended Network</text:p>
      <text:p text:style-name="Standard"/>
      <text:p text:style-name="Standard">GGTCMULTIMULTIVERSE.com · GGTC.STORE · GGTCTRAINING.com · GGTCPUBLISHING.com · GGTCGLOBALMEDIA.com · GGTCSTEMTRAINING.com · GGTCQuantumkids.org</text:p>
      <text:p text:style-name="Standard"/>
      <text:p text:style-name="Standard"/>
      <text:p text:style-name="Standard"/>
      <text:p text:style-name="Standard">Authority Statement</text:p>
      <text:p text:style-name="Standard"/>
      <text:p text:style-name="Standard">This document is governed under GGTC.info Master Systems doctrine.</text:p>
      <text:p text:style-name="Standard"/>
      <text:p text:style-name="Standard">All implementations must reference this structure without deviation.</text:p>
      <text:p text:style-name="Standard"/>
      <text:p text:style-name="Standard"><text:soft-page-break/></text:p>
      <text:p text:style-name="Standard"/>
      <text:p text:style-name="Standard"><text:s/>Attribution</text:p>
      <text:p text:style-name="Standard"/>
      <text:p text:style-name="Standard">Original work by GGTC.info Publishing Team <text:s/></text:p>
      <text:p text:style-name="Standard">operations@GGTC.info</text:p>
      <text:p text:style-name="Standard"/>
      <text:p text:style-name="Standard">---</text:p>
      <text:p text:style-name="Standard"/>
      <text:p text:style-name="Standard"><text:s/>Author</text:p>
      <text:p text:style-name="Standard"/>
      <text:p text:style-name="Standard"><text:s/>Olivia Bennett <text:s/></text:p>
      <text:p text:style-name="Standard">SEO Content Specialist · GGTC.info Publishing**</text:p>
      <text:p text:style-name="Standard"/>
      <text:p text:style-name="Standard">Focus:</text:p>
      <text:p text:style-name="Standard"/>
      <text:p text:style-name="Standard">- keyword strategy <text:s/></text:p>
      <text:p text:style-name="Standard">- on-page optimization <text:s/></text:p>
      <text:p text:style-name="Standard">- long-form content development <text:s/></text:p>
      <text:p text:style-name="Standard"/>
      <text:p text:style-name="Standard">---</text:p>
      <text:p text:style-name="Standard"/>
      <text:p text:style-name="Standard">📚 Sources &amp; Citations</text:p>
      <text:p text:style-name="Standard"/>
      <text:p text:style-name="P1">- World Population Review — Mother’s Day by Country</text:p>
      <text:p text:style-name="P1"><text:s text:c="2"/></text:p>
      <text:p text:style-name="Standard"><text:s text:c="2"/>https://worldpopulationreview.com/country-rankings/mothers-day-by-country</text:p>
      <text:p text:style-name="Standard"/>
      <text:p text:style-name="P1">- Britannica — Mother’s Day</text:p>
      <text:p text:style-name="P1"><text:s/></text:p>
      <text:p text:style-name="Standard"><text:s text:c="2"/>https://www.britannica.com/topic/Mothers-Day</text:p>
      <text:p text:style-name="Standard"/>
      <text:p text:style-name="P1">- History.com — Mother’s Day History</text:p>
      <text:p text:style-name="P1"><text:s/></text:p>
      <text:p text:style-name="Standard"><text:s text:c="2"/>https://www.history.com/topics/holidays/mothers-day</text:p>
      <text:p text:style-name="Standard"/>
      <text:p text:style-name="Standard"/>
      <text:p text:style-name="Standard"/>
      <text:p text:style-name="Standard"><text:s/>📘 GGTC.info LOG BOOK UPDATE</text:p>
      <text:p text:style-name="Standard"/>
      <text:p text:style-name="Standard">SYSTEM ID: </text:p>
      <text:p text:style-name="Standard">GGTC.info_MASTER_SYSTEMS_UPDATE_GGTC.info_DATE_MAY_10_2026_GGTC.info_TIME_05:30`</text:p>
      <text:p text:style-name="Standard"/>
      <text:p text:style-name="Standard">DATE: May 10, 2026 <text:s/></text:p>
      <text:p text:style-name="Standard">TIME: 05:30 <text:s/></text:p>
      <text:p text:style-name="Standard">LANE:Global Media / Family Systems / Mother’s Day Publication <text:s/></text:p>
      <text:p text:style-name="Standard"/>
      <text:p text:style-name="Standard"/>
      <text:p text:style-name="Standard"/>
      <text:p text:style-name="Standard"><text:s/>ENTRY SUMMARY</text:p>
      <text:p text:style-name="Standard"/>
      <text:p text:style-name="Standard"><text:soft-page-break/>The final publication version of the Mother’s Day global article has been completed and updated with:</text:p>
      <text:p text:style-name="Standard"/>
      <text:p text:style-name="Standard">- GGTC.info Authority Block <text:s/></text:p>
      <text:p text:style-name="Standard">- approved ecosystem structure <text:s/></text:p>
      <text:p text:style-name="Standard">- verified domain network <text:s/></text:p>
      <text:p text:style-name="Standard">- official social channels <text:s/></text:p>
      <text:p text:style-name="Standard">- finalized author attribution (Olivia Bennett) <text:s/></text:p>
      <text:p text:style-name="Standard">- publication-ready formatting <text:s/></text:p>
      <text:p text:style-name="Standard"/>
      <text:p text:style-name="Standard">The article is now prepared for:</text:p>
      <text:p text:style-name="Standard"/>
      <text:p text:style-name="Standard">- Git repository integration <text:s/></text:p>
      <text:p text:style-name="Standard">- GGTCGLOBALMEDIA deployment <text:s/></text:p>
      <text:p text:style-name="Standard">- GGTC.STORE ecosystem visibility <text:s/></text:p>
      <text:p text:style-name="Standard">- public publication distribution <text:s/></text:p>
      <text:p text:style-name="Standard"/>
      <text:p text:style-name="Standard">---</text:p>
      <text:p text:style-name="Standard"/>
      <text:p text:style-name="Standard"><text:s/>STATUS</text:p>
      <text:p text:style-name="Standard"/>
      <text:p text:style-name="Standard">✅ FINAL VERSION COMPLETE <text:s/></text:p>
      <text:p text:style-name="Standard">✅ AUTHOR UPDATED <text:s/></text:p>
      <text:p text:style-name="Standard">✅ AUTHORITY BLOCK ACTIVE <text:s/></text:p>
      <text:p text:style-name="Standard">✅ SOURCES VERIFIED <text:s/></text:p>
      <text:p text:style-name="Standard">✅ READY FOR DEPLOYMENT <text:s/></text:p>
      <text:p text:style-name="Standard"/>
      <text:p text:style-name="Standard">---</text:p>
      <text:p text:style-name="Standard"/>
      <text:p text:style-name="Standard">**GGTC.INFO — STRUCTURED SYSTEMS. GLOBAL LEARNING. CONTINUOUS DEVELOPMENT.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05:31:06.753893324</meta:creation-date>
    <dc:date>2026-05-10T05:35:39.491353373</dc:date>
    <meta:editing-duration>PT4M24S</meta:editing-duration>
    <meta:editing-cycles>3</meta:editing-cycles>
    <meta:generator>LibreOffice/25.8.6.2$Linux_X86_64 LibreOffice_project/a46b460d1686bb49c718d2ef5f88b83ff2dc4981</meta:generator>
    <meta:print-date>2026-05-10T05:35:36.231582136</meta:print-date>
    <meta:printed-by>PDF files</meta:printed-by>
    <meta:document-statistic meta:table-count="0" meta:image-count="0" meta:object-count="0" meta:page-count="7" meta:paragraph-count="187" meta:word-count="949" meta:character-count="6764" meta:non-whitespace-character-count="580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GGTC.INFO_GLOBALMEDIA_PUBLICATION_PERSPECTIVEMOTHERS_-DAY_V000" VL:creator="" dc:date-time="2026-05-10T05:35:28"/>
  <VL:version-entry VL:title="Version2" VL:comment="Automatically saved version" VL:creator="" dc:date-time="2026-05-10T05:35:40"/>
</VL:version-list>
</file>